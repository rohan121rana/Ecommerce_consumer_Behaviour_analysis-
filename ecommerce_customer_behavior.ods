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0756in"/>
    </style:style>
    <style:style style:name="co9" style:family="table-column">
      <style:table-column-properties fo:break-before="auto" style:column-width="1.172in"/>
    </style:style>
    <style:style style:name="co10" style:family="table-column">
      <style:table-column-properties fo:break-before="auto" style:column-width="1.78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882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1.3575in"/>
    </style:style>
    <style:style style:name="co15" style:family="table-column">
      <style:table-column-properties fo:break-before="auto" style:column-width="1.9665in"/>
    </style:style>
    <style:style style:name="co16" style:family="table-column">
      <style:table-column-properties fo:break-before="auto" style:column-width="1.6661in"/>
    </style:style>
    <style:style style:name="co17" style:family="table-column">
      <style:table-column-properties fo:break-before="auto" style:column-width="1.7744in"/>
    </style:style>
    <style:style style:name="co18" style:family="table-column">
      <style:table-column-properties fo:break-before="auto" style:column-width="2.3138in"/>
    </style:style>
    <style:style style:name="co19" style:family="table-column">
      <style:table-column-properties fo:break-before="auto" style:column-width="1.2366in"/>
    </style:style>
    <style:style style:name="co20" style:family="table-column">
      <style:table-column-properties fo:break-before="auto" style:column-width="1.2063in"/>
    </style:style>
    <style:style style:name="co21" style:family="table-column">
      <style:table-column-properties fo:break-before="auto" style:column-width="1.1909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2.0252in"/>
    </style:style>
    <style:style style:name="co24" style:family="table-column">
      <style:table-column-properties fo:break-before="auto" style:column-width="1.2583in"/>
    </style:style>
    <style:style style:name="co25" style:family="table-column">
      <style:table-column-properties fo:break-before="auto" style:column-width="2.0028in"/>
    </style:style>
    <style:style style:name="co26" style:family="table-column">
      <style:table-column-properties fo:break-before="auto" style:column-width="2.152in"/>
    </style:style>
    <style:style style:name="co27" style:family="table-column">
      <style:table-column-properties fo:break-before="auto" style:column-width="1.3028in"/>
    </style:style>
    <style:style style:name="co28" style:family="table-column">
      <style:table-column-properties fo:break-before="auto" style:column-width="1.4701in"/>
    </style:style>
    <style:style style:name="co29" style:family="table-column">
      <style:table-column-properties fo:break-before="auto" style:column-width="2.0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>
      <style:table-cell-properties fo:background-color="#ff8000"/>
      <style:text-properties fo:color="#55308d" style:font-name="Liberation Serif" fo:font-size="20pt" fo:font-weight="bold" style:font-name-asian="DejaVu Sans" style:font-size-asian="20pt" style:font-weight-asian="bold" style:font-name-complex="Noto Sans Arabic" style:font-size-complex="20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ustomer 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embership Type</text:p>
          </table:table-cell>
          <table:table-cell office:value-type="string" calcext:value-type="string">
            <text:p>Total Spend</text:p>
          </table:table-cell>
          <table:table-cell office:value-type="string" calcext:value-type="string">
            <text:p>Items Purchased</text:p>
          </table:table-cell>
          <table:table-cell office:value-type="string" calcext:value-type="string">
            <text:p>Average Rating</text:p>
          </table:table-cell>
          <table:table-cell table:style-name="Default" office:value-type="string" calcext:value-type="string">
            <text:p>Discount Applied</text:p>
          </table:table-cell>
          <table:table-cell office:value-type="string" calcext:value-type="string">
            <text:p>Days Since Last Purchase</text:p>
          </table:table-cell>
          <table:table-cell office:value-type="string" calcext:value-type="string">
            <text:p>Satisfaction Leve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20.2" calcext:value-type="float">
            <text:p>1120.2</text:p>
          </table:table-cell>
          <table:table-cell office:value-type="float" office:value="14" calcext:value-type="float">
            <text:p>1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5" calcext:value-type="float">
            <text:p>780.5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0.75" calcext:value-type="float">
            <text:p>510.75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80.3" calcext:value-type="float">
            <text:p>1480.3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20.4" calcext:value-type="float">
            <text:p>72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8" calcext:value-type="float">
            <text:p>440.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50.6" calcext:value-type="float">
            <text:p>115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9" calcext:value-type="float">
            <text:p>800.9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5.25" calcext:value-type="float">
            <text:p>495.25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20.1" calcext:value-type="float">
            <text:p>1520.1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3" calcext:value-type="float">
            <text:p>690.3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200.8" calcext:value-type="float">
            <text:p>1200.8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75" calcext:value-type="float">
            <text:p>820.75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30.4" calcext:value-type="float">
            <text:p>53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60.2" calcext:value-type="float">
            <text:p>1360.2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6" calcext:value-type="float">
            <text:p>700.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50.9" calcext:value-type="float">
            <text:p>450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70.3" calcext:value-type="float">
            <text:p>1170.3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9" calcext:value-type="float">
            <text:p>81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4" calcext:value-type="float">
            <text:p>70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20.8" calcext:value-type="float">
            <text:p>420.8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9" calcext:value-type="float">
            <text:p>81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4" calcext:value-type="float">
            <text:p>70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9" calcext:value-type="float">
            <text:p>81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4" calcext:value-type="float">
            <text:p>70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20.8" calcext:value-type="float">
            <text:p>420.8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9" calcext:value-type="float">
            <text:p>81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4" calcext:value-type="float">
            <text:p>70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20.8" calcext:value-type="float">
            <text:p>420.8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9" calcext:value-type="float">
            <text:p>81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4" calcext:value-type="float">
            <text:p>70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20.8" calcext:value-type="float">
            <text:p>1420.8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30.4" calcext:value-type="float">
            <text:p>730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50.6" calcext:value-type="float">
            <text:p>450.6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210.6" calcext:value-type="float">
            <text:p>1210.6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9" calcext:value-type="float">
            <text:p>780.9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5.25" calcext:value-type="float">
            <text:p>495.25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90.2" calcext:value-type="float">
            <text:p>139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6" calcext:value-type="float">
            <text:p>67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9" calcext:value-type="float">
            <text:p>46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70.3" calcext:value-type="float">
            <text:p>1170.3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2" calcext:value-type="float">
            <text:p>81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5.75" calcext:value-type="float">
            <text:p>515.75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50.5" calcext:value-type="float">
            <text:p>145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4" calcext:value-type="float">
            <text:p>69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20.8" calcext:value-type="float">
            <text:p>42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30.6" calcext:value-type="float">
            <text:p>113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0.25" calcext:value-type="float">
            <text:p>48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80.3" calcext:value-type="float">
            <text:p>68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80.8" calcext:value-type="float">
            <text:p>118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70.5" calcext:value-type="float">
            <text:p>147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85.25" calcext:value-type="float">
            <text:p>48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500.1" calcext:value-type="float">
            <text:p>150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70.3" calcext:value-type="float">
            <text:p>67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60.5" calcext:value-type="float">
            <text:p>46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75" calcext:value-type="float">
            <text:p>830.7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0.4" calcext:value-type="float">
            <text:p>52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370.2" calcext:value-type="float">
            <text:p>1370.2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6" calcext:value-type="float">
            <text:p>690.6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9" calcext:value-type="float">
            <text:p>440.9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25.75" calcext:value-type="float">
            <text:p>525.75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20.4" calcext:value-type="float">
            <text:p>72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8" calcext:value-type="float">
            <text:p>440.8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50.6" calcext:value-type="float">
            <text:p>115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30.9" calcext:value-type="float">
            <text:p>83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0.25" calcext:value-type="float">
            <text:p>490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80.1" calcext:value-type="float">
            <text:p>148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90.3" calcext:value-type="float">
            <text:p>69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80.5" calcext:value-type="float">
            <text:p>48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70.8" calcext:value-type="float">
            <text:p>117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90.2" calcext:value-type="float">
            <text:p>790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0.75" calcext:value-type="float">
            <text:p>510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40.5" calcext:value-type="float">
            <text:p>1440.5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00.4" calcext:value-type="float">
            <text:p>70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10.8" calcext:value-type="float">
            <text:p>41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6" calcext:value-type="float">
            <text:p>116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10.9" calcext:value-type="float">
            <text:p>81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5.25" calcext:value-type="float">
            <text:p>49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5" calcext:value-type="float">
            <text:p>43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200.8" calcext:value-type="float">
            <text:p>120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2" calcext:value-type="float">
            <text:p>78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9" calcext:value-type="float">
            <text:p>800.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75.25" calcext:value-type="float">
            <text:p>47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80.1" calcext:value-type="float">
            <text:p>148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70.2" calcext:value-type="float">
            <text:p>770.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5.75" calcext:value-type="float">
            <text:p>51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50.5" calcext:value-type="float">
            <text:p>1450.5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6" calcext:value-type="float">
            <text:p>116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5.25" calcext:value-type="float">
            <text:p>49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5" calcext:value-type="float">
            <text:p>44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200.8" calcext:value-type="float">
            <text:p>120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2" calcext:value-type="float">
            <text:p>78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9" calcext:value-type="float">
            <text:p>800.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75.25" calcext:value-type="float">
            <text:p>47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80.1" calcext:value-type="float">
            <text:p>148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2" calcext:value-type="float">
            <text:p>80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5.75" calcext:value-type="float">
            <text:p>51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50.5" calcext:value-type="float">
            <text:p>1450.5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6" calcext:value-type="float">
            <text:p>116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5.25" calcext:value-type="float">
            <text:p>49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5" calcext:value-type="float">
            <text:p>44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200.8" calcext:value-type="float">
            <text:p>120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2" calcext:value-type="float">
            <text:p>78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9" calcext:value-type="float">
            <text:p>800.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75.25" calcext:value-type="float">
            <text:p>47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80.1" calcext:value-type="float">
            <text:p>148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2" calcext:value-type="float">
            <text:p>780.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5.75" calcext:value-type="float">
            <text:p>51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50.5" calcext:value-type="float">
            <text:p>1450.5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30.8" calcext:value-type="float">
            <text:p>43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60.6" calcext:value-type="float">
            <text:p>116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20.9" calcext:value-type="float">
            <text:p>820.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95.25" calcext:value-type="float">
            <text:p>49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90.1" calcext:value-type="float">
            <text:p>149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40.5" calcext:value-type="float">
            <text:p>440.5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200.8" calcext:value-type="float">
            <text:p>1200.8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2" calcext:value-type="float">
            <text:p>780.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05.75" calcext:value-type="float">
            <text:p>50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60.5" calcext:value-type="float">
            <text:p>1460.5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710.4" calcext:value-type="float">
            <text:p>710.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40.6" calcext:value-type="float">
            <text:p>1140.6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800.9" calcext:value-type="float">
            <text:p>800.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475.25" calcext:value-type="float">
            <text:p>475.25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</text:p>
          </table:table-cell>
          <table:table-cell office:value-type="float" office:value="1480.1" calcext:value-type="float">
            <text:p>1480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ilver</text:p>
          </table:table-cell>
          <table:table-cell office:value-type="float" office:value="660.3" calcext:value-type="float">
            <text:p>660.3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satisfied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ronze</text:p>
          </table:table-cell>
          <table:table-cell office:value-type="float" office:value="470.5" calcext:value-type="float">
            <text:p>47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ld</text:p>
          </table:table-cell>
          <table:table-cell office:value-type="float" office:value="1190.8" calcext:value-type="float">
            <text:p>1190.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ilver</text:p>
          </table:table-cell>
          <table:table-cell office:value-type="float" office:value="780.2" calcext:value-type="float">
            <text:p>780.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ronze</text:p>
          </table:table-cell>
          <table:table-cell office:value-type="float" office:value="515.75" calcext:value-type="float">
            <text:p>515.7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satisfied</text:p>
          </table:table-cell>
        </table:table-row>
      </table:table>
      <table:table table:name="summery 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otal customers</text:p>
          </table:table-cell>
          <table:table-cell office:value-type="string" calcext:value-type="string">
            <text:p>Average spend</text:p>
          </table:table-cell>
          <table:table-cell office:value-type="string" calcext:value-type="string">
            <text:p>Maximum Spend</text:p>
          </table:table-cell>
          <table:table-cell office:value-type="string" calcext:value-type="string">
            <text:p>Average Items Purchased </text:p>
          </table:table-cell>
          <table:table-cell office:value-type="string" calcext:value-type="string">
            <text:p>Average Rating </text:p>
          </table:table-cell>
          <table:table-cell office:value-type="string" calcext:value-type="string">
            <text:p>Customers with Discount</text:p>
          </table:table-cell>
          <table:table-cell office:value-type="string" calcext:value-type="string">
            <text:p>Average Days Since Purchase </text:p>
          </table:table-cell>
        </table:table-row>
        <table:table-row table:style-name="ro2">
          <table:table-cell table:style-name="ce2" table:formula="of:=COUNTA([sheet1.A:.A])-1" office:value-type="float" office:value="348" calcext:value-type="float">
            <text:p>348</text:p>
          </table:table-cell>
          <table:table-cell table:formula="of:=AVERAGE([sheet1.F:.F])" office:value-type="float" office:value="847.793103448276" calcext:value-type="float">
            <text:p>847.793103448276</text:p>
          </table:table-cell>
          <table:table-cell table:formula="of:=MAX([sheet1.F:.F])" office:value-type="float" office:value="1520.1" calcext:value-type="float">
            <text:p>1520.1</text:p>
          </table:table-cell>
          <table:table-cell table:style-name="ce3" table:formula="of:=AVERAGE([sheet1.G:.G])" office:value-type="float" office:value="12.632183908046" calcext:value-type="float">
            <text:p>12.632183908046</text:p>
          </table:table-cell>
          <table:table-cell table:formula="of:=AVERAGE([sheet1.H:.H])" office:value-type="float" office:value="4.0235632183908" calcext:value-type="float">
            <text:p>4.0235632183908</text:p>
          </table:table-cell>
          <table:table-cell table:formula="of:=COUNTIF([sheet1.I:.I];&quot;TRUE&quot;)" office:value-type="float" office:value="175" calcext:value-type="float">
            <text:p>175</text:p>
          </table:table-cell>
          <table:table-cell table:style-name="ce4" table:formula="of:=AVERAGE([sheet1.J:.J])" office:value-type="float" office:value="26.6149425287356" calcext:value-type="float">
            <text:p>27</text:p>
          </table:table-cell>
        </table:table-row>
      </table:table>
      <table:table table:name="Charts" table:style-name="ta1">
        <table:shapes>
          <draw:frame draw:z-index="2" draw:style-name="gr1" draw:text-style-name="P1" svg:width="6.2988in" svg:height="3.5429in" svg:x="7.0874in" svg:y="1.0346in">
            <draw:object draw:notify-on-update-of-ranges="Charts.I1:Charts.I1 Charts.I2:Charts.I4 Charts.J1:Charts.J1 Charts.J2:Charts.J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14.6366in" svg:y="0.974in">
            <draw:object draw:notify-on-update-of-ranges="Charts.Q1:Charts.Q1 Charts.Q2:Charts.Q4 Charts.R1:Charts.R1 Charts.R2:Charts.R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number-columns-repeated="9" table:default-cell-style-name="Default"/>
        <table:table-column table:style-name="co19" table:default-cell-style-name="Default"/>
        <table:table-column table:style-name="co11" table:number-columns-repeated="8" table:default-cell-style-name="Default"/>
        <table:table-row table:style-name="ro1">
          <table:table-cell>
            <draw:frame draw:z-index="0" draw:style-name="gr1" draw:text-style-name="P1" svg:width="6.2988in" svg:height="3.5429in" svg:x="0.3358in" svg:y="0.1461in">
              <draw:object draw:notify-on-update-of-ranges="sheet1.C2:sheet1.C349 sheet1.F1:sheet1.F1 sheet1.F2:sheet1.F3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embership </text:p>
          </table:table-cell>
          <table:table-cell office:value-type="string" calcext:value-type="string">
            <text:p>Average Spend </text:p>
          </table:table-cell>
          <table:table-cell table:number-columns-repeated="6"/>
          <table:table-cell office:value-type="string" calcext:value-type="string">
            <text:p>Satisfaction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old </text:p>
          </table:table-cell>
          <table:table-cell table:style-name="ce5" table:formula="of:=AVERAGEIF([sheet1.E:.E];&quot;Gold&quot;;[sheet1.F:.F])" office:value-type="float" office:value="1311.14444444444" calcext:value-type="float">
            <text:p>1311.14</text:p>
          </table:table-cell>
          <table:table-cell table:number-columns-repeated="6"/>
          <table:table-cell office:value-type="string" calcext:value-type="string">
            <text:p>Satisfied </text:p>
          </table:table-cell>
          <table:table-cell table:formula="of:=COUNTIF([sheet1.K:.K];&quot;Satisfied&quot;)" office:value-type="float" office:value="125" calcext:value-type="float">
            <text:p>1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ilver</text:p>
          </table:table-cell>
          <table:table-cell table:style-name="ce5" table:formula="of:=AVERAGEIF([sheet1.E:.E];&quot;Silver&quot;;[sheet1.F:.F])" office:value-type="float" office:value="748.432478632479" calcext:value-type="float">
            <text:p>748.43</text:p>
          </table:table-cell>
          <table:table-cell table:number-columns-repeated="6"/>
          <table:table-cell office:value-type="string" calcext:value-type="string">
            <text:p>Neutral </text:p>
          </table:table-cell>
          <table:table-cell table:formula="of:=COUNTIF([sheet1.K:.K];&quot;Neutral&quot;)" office:value-type="float" office:value="107" calcext:value-type="float">
            <text:p>1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ronze</text:p>
          </table:table-cell>
          <table:table-cell table:style-name="ce5" table:formula="of:=AVERAGEIF([sheet1.E:.E];&quot;Bronze&quot;;[sheet1.F:.F])" office:value-type="float" office:value="474.223684210526" calcext:value-type="float">
            <text:p>474.22</text:p>
          </table:table-cell>
          <table:table-cell table:number-columns-repeated="6"/>
          <table:table-cell office:value-type="string" calcext:value-type="string">
            <text:p>Unsatisfied</text:p>
          </table:table-cell>
          <table:table-cell table:formula="of:=COUNTIF([sheet1.K:.K];&quot;Unsatisfied&quot;)" office:value-type="float" office:value="116" calcext:value-type="float">
            <text:p>116</text:p>
          </table:table-cell>
        </table:table-row>
        <table:table-row table:style-name="ro1" table:number-rows-repeated="18">
          <table:table-cell table:number-columns-repeated="18"/>
        </table:table-row>
        <table:table-row table:style-name="ro1">
          <table:table-cell>
            <draw:frame draw:z-index="1" draw:style-name="gr1" draw:text-style-name="P1" svg:width="6.2988in" svg:height="3.5429in" svg:x="0.4673in" svg:y="0.1232in">
              <draw:object draw:notify-on-update-of-ranges="sheet1.F2:sheet1.F349 sheet1.G1:sheet1.G1 sheet1.G2:sheet1.G34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</table:table-row>
      </table:table>
      <table:table table:name="Dashboard" table:style-name="ta1">
        <table:shapes>
          <draw:frame draw:z-index="2" draw:style-name="gr1" draw:text-style-name="P1" svg:width="6.2988in" svg:height="3.5429in" svg:x="7.5209in" svg:y="1.9799in">
            <draw:object draw:notify-on-update-of-ranges="Charts.I2:Charts.I4 Charts.J1:Charts.J1 Charts.J2:Charts.J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2">
            <text:p><text:s text:c="6"/>E-Commerce Customer Behavior Dashboar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tal customers</text:p>
          </table:table-cell>
          <table:table-cell office:value-type="string" calcext:value-type="string">
            <text:p>Average spend</text:p>
          </table:table-cell>
          <table:table-cell office:value-type="string" calcext:value-type="string">
            <text:p>Maximum Spend</text:p>
          </table:table-cell>
          <table:table-cell office:value-type="string" calcext:value-type="string">
            <text:p>Average Items Purchased </text:p>
          </table:table-cell>
          <table:table-cell office:value-type="string" calcext:value-type="string">
            <text:p>Average Rating </text:p>
          </table:table-cell>
          <table:table-cell office:value-type="string" calcext:value-type="string">
            <text:p>Customers with Discount</text:p>
          </table:table-cell>
          <table:table-cell office:value-type="string" calcext:value-type="string">
            <text:p>Average Days Since Purchase </text:p>
          </table:table-cell>
          <table:table-cell table:number-columns-repeated="3"/>
        </table:table-row>
        <table:table-row table:style-name="ro1">
          <table:table-cell table:style-name="ce2" table:formula="of:=COUNTA([sheet1.A:.A])-1" office:value-type="float" office:value="348" calcext:value-type="float">
            <text:p>348</text:p>
          </table:table-cell>
          <table:table-cell table:formula="of:=AVERAGE([sheet1.F:.F])" office:value-type="float" office:value="847.793103448276" calcext:value-type="float">
            <text:p>847.793103448276</text:p>
          </table:table-cell>
          <table:table-cell table:formula="of:=MAX([sheet1.F:.F])" office:value-type="float" office:value="1520.1" calcext:value-type="float">
            <text:p>1520.1</text:p>
          </table:table-cell>
          <table:table-cell table:formula="of:=AVERAGE([sheet1.G:.G])" office:value-type="float" office:value="12.632183908046" calcext:value-type="float">
            <text:p>12.632183908046</text:p>
          </table:table-cell>
          <table:table-cell table:formula="of:=AVERAGE([sheet1.H:.H])" office:value-type="float" office:value="4.0235632183908" calcext:value-type="float">
            <text:p>4.0235632183908</text:p>
          </table:table-cell>
          <table:table-cell table:formula="of:=COUNTIF([sheet1.I:.I];&quot;TRUE&quot;)" office:value-type="float" office:value="175" calcext:value-type="float">
            <text:p>175</text:p>
          </table:table-cell>
          <table:table-cell table:style-name="ce4" table:formula="of:=AVERAGE([sheet1.J:.J])" office:value-type="float" office:value="26.6149425287356" calcext:value-type="float">
            <text:p>27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draw:z-index="0" draw:style-name="gr1" draw:text-style-name="P1" svg:width="6.2988in" svg:height="3.5429in" svg:x="0.1736in" svg:y="0.0858in">
              <draw:object draw:notify-on-update-of-ranges="sheet1.C2:sheet1.C349 sheet1.F1:sheet1.F1 sheet1.F2:sheet1.F34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number-columns-repeated="5"/>
          <table:table-cell>
            <draw:frame draw:z-index="3" draw:style-name="gr1" draw:text-style-name="P1" svg:width="6.2988in" svg:height="3.5429in" svg:x="0.5756in" svg:y="0.165in">
              <draw:object draw:notify-on-update-of-ranges="Charts.Q2:Charts.Q4 Charts.R1:Charts.R1 Charts.R2:Charts.R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>
            <draw:frame draw:z-index="1" draw:style-name="gr1" draw:text-style-name="P1" svg:width="6.2988in" svg:height="3.5429in" svg:x="0.3185in" svg:y="0.0051in">
              <draw:object draw:notify-on-update-of-ranges="sheet1.F2:sheet1.F349 sheet1.G1:sheet1.G1 sheet1.G2:sheet1.G34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K34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0T20:10:49.034747586</dc:date>
    <meta:editing-duration>PT9M44S</meta:editing-duration>
    <meta:editing-cycles>1</meta:editing-cycles>
    <meta:document-statistic meta:table-count="4" meta:cell-count="3884" meta:object-count="8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Age vs Total Spend</text:p>
        </chart:title>
        <chart:legend chart:legend-position="end" svg:x="13.393cm" svg:y="4.201cm" style:legend-expansion="high" chart:style-name="ch3"/>
        <chart:plot-area chart:style-name="ch4" table:cell-range-address="sheet1.C2:sheet1.C349 sheet1.F1:sheet1.F349" chart:data-source-has-labels="row" svg:x="0.32cm" svg:y="1.275cm" svg:width="12.753cm" svg:height="7.545cm">
          <chart:coordinate-region svg:x="1.312cm" svg:y="1.475cm" svg:width="11.574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49" chart:label-cell-address="sheet1.F1:sheet1.F1" chart:class="chart:scatter">
            <chart:domain table:cell-range-address="sheet1.C2:sheet1.C349"/>
            <chart:data-point chart:repeated="3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tal Spen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1.C2:sheet1.C349</svg:desc>
                </draw:g>
              </table:table-cell>
              <table:table-cell office:value-type="float" office:value="1120.2">
                <text:p>1120.2</text:p>
                <draw:g>
                  <svg:desc>sheet1.F2:sheet1.F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780.5">
                <text:p>78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80.3">
                <text:p>148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150.6">
                <text:p>115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520.1">
                <text:p>15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690.3">
                <text:p>69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820.75">
                <text:p>82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530.4">
                <text:p>53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360.2">
                <text:p>13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450.9">
                <text:p>45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170.3">
                <text:p>117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">
                <text:p>36</text:p>
              </table:table-cell>
              <table:table-cell office:value-type="float" office:value="1420.8">
                <text:p>1420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">
                <text:p>29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">
                <text:p>35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">
                <text:p>31</text:p>
              </table:table-cell>
              <table:table-cell office:value-type="float" office:value="1210.6">
                <text:p>1210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">
                <text:p>27</text:p>
              </table:table-cell>
              <table:table-cell office:value-type="float" office:value="780.9">
                <text:p>78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">
                <text:p>42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">
                <text:p>29</text:p>
              </table:table-cell>
              <table:table-cell office:value-type="float" office:value="1390.2">
                <text:p>139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  <table:table-cell office:value-type="float" office:value="670.6">
                <text:p>67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">
                <text:p>38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">
                <text:p>32</text:p>
              </table:table-cell>
              <table:table-cell office:value-type="float" office:value="1170.3">
                <text:p>1170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  <table:table-cell office:value-type="float" office:value="810.2">
                <text:p>810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">
                <text:p>27</text:p>
              </table:table-cell>
              <table:table-cell office:value-type="float" office:value="690.4">
                <text:p>690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">
                <text:p>43</text:p>
              </table:table-cell>
              <table:table-cell office:value-type="float" office:value="525.75">
                <text:p>525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">
                <text:p>31</text:p>
              </table:table-cell>
              <table:table-cell office:value-type="float" office:value="1150.6">
                <text:p>1150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">
                <text:p>35</text:p>
              </table:table-cell>
              <table:table-cell office:value-type="float" office:value="830.9">
                <text:p>830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">
                <text:p>41</text:p>
              </table:table-cell>
              <table:table-cell office:value-type="float" office:value="490.25">
                <text:p>490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690.3">
                <text:p>690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1170.8">
                <text:p>1170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">
                <text:p>43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1440.5">
                <text:p>1440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410.8">
                <text:p>410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">
                <text:p>33</text:p>
              </table:table-cell>
              <table:table-cell office:value-type="float" office:value="770.2">
                <text:p>77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">
                <text:p>36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">
                <text:p>33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">
                <text:p>36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">
                <text:p>36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5cm" svg:y="0.271cm" chart:style-name="ch2">
          <text:p>Memerhsip type vs Average spend</text:p>
        </chart:title>
        <chart:legend chart:legend-position="end" svg:x="12.784cm" svg:y="4.201cm" style:legend-expansion="high" chart:style-name="ch3"/>
        <chart:plot-area chart:style-name="ch4" table:cell-range-address="Charts.I1:Charts.J4" chart:data-source-has-labels="both" svg:x="1.331cm" svg:y="1.275cm" svg:width="11.133cm" svg:height="6.564cm">
          <chart:coordinate-region svg:x="2.799cm" svg:y="1.474cm" svg:width="9.66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Membership type</text:p>
            </chart:title>
            <chart:categories table:cell-range-address="Charts.I2:Charts.I4"/>
          </chart:axis>
          <chart:axis chart:dimension="y" chart:name="primary-y" chart:style-name="ch7">
            <chart:title svg:x="0.451cm" svg:y="5.659cm" chart:style-name="ch8">
              <text:p>average spend</text:p>
            </chart:title>
            <chart:grid chart:style-name="ch9" chart:class="major"/>
          </chart:axis>
          <chart:series chart:style-name="ch10" chart:values-cell-range-address="Charts.J2:Charts.J4" chart:label-cell-address="Charts.J1:Charts.J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pend </text:p>
                <draw:g>
                  <svg:desc>Charts.J1:Char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old </text:p>
                <draw:g>
                  <svg:desc>Charts.I2:Charts.I4</svg:desc>
                </draw:g>
              </table:table-cell>
              <table:table-cell office:value-type="float" office:value="1311.14444444444">
                <text:p>1311.14444444444</text:p>
                <draw:g>
                  <svg:desc>Charts.J2:Charts.J4</svg:desc>
                </draw:g>
              </table:table-cell>
            </table:table-row>
            <table:table-row>
              <table:table-cell office:value-type="string">
                <text:p>silver</text:p>
              </table:table-cell>
              <table:table-cell office:value-type="float" office:value="748.432478632479">
                <text:p>748.432478632479</text:p>
              </table:table-cell>
            </table:table-row>
            <table:table-row>
              <table:table-cell office:value-type="string">
                <text:p>Bronze</text:p>
              </table:table-cell>
              <table:table-cell office:value-type="float" office:value="474.223684210526">
                <text:p>474.223684210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Items Purchased vs Total spend </text:p>
        </chart:title>
        <chart:legend chart:legend-position="end" svg:x="12.679cm" svg:y="4.201cm" style:legend-expansion="high" chart:style-name="ch3"/>
        <chart:plot-area chart:style-name="ch4" table:cell-range-address="sheet1.F2:sheet1.G349 sheet1.G1:sheet1.G1" chart:data-source-has-labels="row" svg:x="0.32cm" svg:y="1.275cm" svg:width="12.039cm" svg:height="7.545cm">
          <chart:coordinate-region svg:x="0.942cm" svg:y="1.475cm" svg:width="11.045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349" chart:label-cell-address="sheet1.G1:sheet1.G1" chart:class="chart:scatter">
            <chart:domain table:cell-range-address="sheet1.F2:sheet1.F349"/>
            <chart:data-point chart:repeated="3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tems Purchas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0.2">
                <text:p>1120.2</text:p>
                <draw:g>
                  <svg:desc>sheet1.F2:sheet1.F349</svg:desc>
                </draw:g>
              </table:table-cell>
              <table:table-cell office:value-type="float" office:value="14">
                <text:p>14</text:p>
                <draw:g>
                  <svg:desc>sheet1.G2:sheet1.G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.5">
                <text:p>78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.75">
                <text:p>510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0.3">
                <text:p>148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0.4">
                <text:p>72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.8">
                <text:p>440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0.6">
                <text:p>115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5.25">
                <text:p>495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0.1">
                <text:p>152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.3">
                <text:p>690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0.5">
                <text:p>47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0.75">
                <text:p>82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0.4">
                <text:p>53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2">
                <text:p>136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.6">
                <text:p>70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.9">
                <text:p>45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0.3">
                <text:p>117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20.8">
                <text:p>1420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30.4">
                <text:p>73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0.6">
                <text:p>45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0.6">
                <text:p>1210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0.9">
                <text:p>780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5.25">
                <text:p>495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90.2">
                <text:p>139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0.6">
                <text:p>67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0.9">
                <text:p>46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0.3">
                <text:p>117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0.2">
                <text:p>81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5.75">
                <text:p>515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50.5">
                <text:p>145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0.4">
                <text:p>69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5.75">
                <text:p>525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0.4">
                <text:p>72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0.8">
                <text:p>44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0.6">
                <text:p>115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0.9">
                <text:p>83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0.25">
                <text:p>49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0.3">
                <text:p>69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0.5">
                <text:p>48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0.8">
                <text:p>117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0.75">
                <text:p>51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40.5">
                <text:p>144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0.8">
                <text:p>41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0.5">
                <text:p>43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0.2">
                <text:p>77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50.5">
                <text:p>145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0.5">
                <text:p>44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50.5">
                <text:p>145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0.5">
                <text:p>44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50.5">
                <text:p>145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0.5">
                <text:p>44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Customer Satisfaction DIstribution</text:p>
        </chart:title>
        <chart:legend chart:legend-position="end" svg:x="14.345cm" svg:y="4.201cm" style:legend-expansion="high" chart:style-name="ch3"/>
        <chart:plot-area chart:style-name="ch4" table:cell-range-address="Charts.Q1:Charts.R4" chart:data-source-has-labels="both" svg:x="1.331cm" svg:y="1.275cm" svg:width="12.694cm" svg:height="6.564cm">
          <chart:coordinate-region svg:x="3.276cm" svg:y="1.275cm" svg:width="10.469cm" svg:height="5.917cm"/>
          <chart:axis chart:dimension="x" chart:name="primary-x" chart:style-name="ch5" chartooo:axis-type="auto">
            <chartooo:date-scale/>
            <chart:title svg:x="0.451cm" svg:y="5.038cm" chart:style-name="ch6">
              <text:p>count </text:p>
            </chart:title>
            <chart:categories table:cell-range-address="Charts.Q2:Charts.Q4"/>
          </chart:axis>
          <chart:axis chart:dimension="y" chart:name="primary-y" chart:style-name="ch7">
            <chart:title svg:x="6.801cm" svg:y="8.019cm" chart:style-name="ch8">
              <text:p>Satisfaction</text:p>
            </chart:title>
            <chart:grid chart:style-name="ch9" chart:class="major"/>
          </chart:axis>
          <chart:series chart:style-name="ch10" chart:values-cell-range-address="Charts.R2:Charts.R4" chart:label-cell-address="Charts.R1:Charts.R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harts.R1:Char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tisfied </text:p>
                <draw:g>
                  <svg:desc>Charts.Q2:Charts.Q4</svg:desc>
                </draw:g>
              </table:table-cell>
              <table:table-cell office:value-type="float" office:value="125">
                <text:p>125</text:p>
                <draw:g>
                  <svg:desc>Charts.R2:Charts.R4</svg:desc>
                </draw:g>
              </table:table-cell>
            </table:table-row>
            <table:table-row>
              <table:table-cell office:value-type="string">
                <text:p>Neutral 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Unsatisfied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Age vs Total Spend</text:p>
        </chart:title>
        <chart:legend chart:legend-position="end" svg:x="13.393cm" svg:y="4.201cm" style:legend-expansion="high" chart:style-name="ch3"/>
        <chart:plot-area chart:style-name="ch4" table:cell-range-address="sheet1.C2:sheet1.C349 sheet1.F1:sheet1.F349" chart:data-source-has-labels="row" svg:x="0.32cm" svg:y="1.275cm" svg:width="12.753cm" svg:height="7.545cm">
          <chart:coordinate-region svg:x="1.312cm" svg:y="1.475cm" svg:width="11.574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49" chart:label-cell-address="sheet1.F1:sheet1.F1" chart:class="chart:scatter">
            <chart:domain table:cell-range-address="sheet1.C2:sheet1.C349"/>
            <chart:data-point chart:repeated="3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tal Spen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1.C2:sheet1.C349</svg:desc>
                </draw:g>
              </table:table-cell>
              <table:table-cell office:value-type="float" office:value="1120.2">
                <text:p>1120.2</text:p>
                <draw:g>
                  <svg:desc>sheet1.F2:sheet1.F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780.5">
                <text:p>78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80.3">
                <text:p>148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150.6">
                <text:p>115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520.1">
                <text:p>15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690.3">
                <text:p>69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820.75">
                <text:p>82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530.4">
                <text:p>53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360.2">
                <text:p>13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450.9">
                <text:p>45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170.3">
                <text:p>117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">
                <text:p>36</text:p>
              </table:table-cell>
              <table:table-cell office:value-type="float" office:value="1420.8">
                <text:p>1420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">
                <text:p>29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">
                <text:p>35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">
                <text:p>31</text:p>
              </table:table-cell>
              <table:table-cell office:value-type="float" office:value="1210.6">
                <text:p>1210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">
                <text:p>27</text:p>
              </table:table-cell>
              <table:table-cell office:value-type="float" office:value="780.9">
                <text:p>78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">
                <text:p>42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">
                <text:p>29</text:p>
              </table:table-cell>
              <table:table-cell office:value-type="float" office:value="1390.2">
                <text:p>139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  <table:table-cell office:value-type="float" office:value="670.6">
                <text:p>67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">
                <text:p>38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">
                <text:p>32</text:p>
              </table:table-cell>
              <table:table-cell office:value-type="float" office:value="1170.3">
                <text:p>1170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  <table:table-cell office:value-type="float" office:value="810.2">
                <text:p>810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">
                <text:p>27</text:p>
              </table:table-cell>
              <table:table-cell office:value-type="float" office:value="690.4">
                <text:p>690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">
                <text:p>37</text:p>
              </table:table-cell>
              <table:table-cell office:value-type="float" office:value="420.8">
                <text:p>420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1130.6">
                <text:p>1130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">
                <text:p>41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  <table:table-cell office:value-type="float" office:value="680.3">
                <text:p>680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">
                <text:p>30</text:p>
              </table:table-cell>
              <table:table-cell office:value-type="float" office:value="1180.8">
                <text:p>1180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">
                <text:p>30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">
                <text:p>41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  <table:table-cell office:value-type="float" office:value="1500.1">
                <text:p>1500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">
                <text:p>32</text:p>
              </table:table-cell>
              <table:table-cell office:value-type="float" office:value="670.3">
                <text:p>670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">
                <text:p>33</text:p>
              </table:table-cell>
              <table:table-cell office:value-type="float" office:value="830.75">
                <text:p>830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">
                <text:p>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">
                <text:p>29</text:p>
              </table:table-cell>
              <table:table-cell office:value-type="float" office:value="1370.2">
                <text:p>137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">
                <text:p>26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">
                <text:p>38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">
                <text:p>32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">
                <text:p>34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">
                <text:p>43</text:p>
              </table:table-cell>
              <table:table-cell office:value-type="float" office:value="525.75">
                <text:p>525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">
                <text:p>31</text:p>
              </table:table-cell>
              <table:table-cell office:value-type="float" office:value="1150.6">
                <text:p>1150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">
                <text:p>35</text:p>
              </table:table-cell>
              <table:table-cell office:value-type="float" office:value="830.9">
                <text:p>830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">
                <text:p>41</text:p>
              </table:table-cell>
              <table:table-cell office:value-type="float" office:value="490.25">
                <text:p>490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690.3">
                <text:p>690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1170.8">
                <text:p>1170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">
                <text:p>34</text:p>
              </table:table-cell>
              <table:table-cell office:value-type="float" office:value="790.2">
                <text:p>79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">
                <text:p>43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1440.5">
                <text:p>1440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">
                <text:p>27</text:p>
              </table:table-cell>
              <table:table-cell office:value-type="float" office:value="700.4">
                <text:p>700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410.8">
                <text:p>410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">
                <text:p>33</text:p>
              </table:table-cell>
              <table:table-cell office:value-type="float" office:value="770.2">
                <text:p>77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">
                <text:p>36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">
                <text:p>33</text:p>
              </table:table-cell>
              <table:table-cell office:value-type="float" office:value="800.2">
                <text:p>80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">
                <text:p>36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">
                <text:p>30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">
                <text:p>37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">
                <text:p>31</text:p>
              </table:table-cell>
              <table:table-cell office:value-type="float" office:value="1160.6">
                <text:p>1160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820.9">
                <text:p>820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">
                <text:p>28</text:p>
              </table:table-cell>
              <table:table-cell office:value-type="float" office:value="1490.1">
                <text:p>1490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">
                <text:p>36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">
                <text:p>30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">
                <text:p>4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">
                <text:p>30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">
                <text:p>27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">
                <text:p>37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">
                <text:p>31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800.9">
                <text:p>800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">
                <text:p>41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1480.1">
                <text:p>1480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">
                <text:p>36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">
                <text:p>30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">
                <text:p>34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3">
                <text:p>43</text:p>
              </table:table-cell>
              <table:table-cell office:value-type="float" office:value="515.75">
                <text:p>515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Items Purchased vs Total spend </text:p>
        </chart:title>
        <chart:legend chart:legend-position="end" svg:x="12.679cm" svg:y="4.201cm" style:legend-expansion="high" chart:style-name="ch3"/>
        <chart:plot-area chart:style-name="ch4" table:cell-range-address="sheet1.F2:sheet1.G349 sheet1.G1:sheet1.G1" chart:data-source-has-labels="row" svg:x="0.32cm" svg:y="1.275cm" svg:width="12.039cm" svg:height="7.545cm">
          <chart:coordinate-region svg:x="0.942cm" svg:y="1.475cm" svg:width="11.045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349" chart:label-cell-address="sheet1.G1:sheet1.G1" chart:class="chart:scatter">
            <chart:domain table:cell-range-address="sheet1.F2:sheet1.F349"/>
            <chart:data-point chart:repeated="3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tems Purchas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0.2">
                <text:p>1120.2</text:p>
                <draw:g>
                  <svg:desc>sheet1.F2:sheet1.F349</svg:desc>
                </draw:g>
              </table:table-cell>
              <table:table-cell office:value-type="float" office:value="14">
                <text:p>14</text:p>
                <draw:g>
                  <svg:desc>sheet1.G2:sheet1.G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.5">
                <text:p>78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.75">
                <text:p>510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0.3">
                <text:p>148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0.4">
                <text:p>72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.8">
                <text:p>440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0.6">
                <text:p>115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5.25">
                <text:p>495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0.1">
                <text:p>152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.3">
                <text:p>690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0.5">
                <text:p>47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0.75">
                <text:p>82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0.4">
                <text:p>53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2">
                <text:p>136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.6">
                <text:p>70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.9">
                <text:p>45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0.3">
                <text:p>117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0.75">
                <text:p>50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20.8">
                <text:p>1420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30.4">
                <text:p>73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0.6">
                <text:p>45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0.6">
                <text:p>1210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0.9">
                <text:p>780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5.25">
                <text:p>495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90.2">
                <text:p>139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0.6">
                <text:p>67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0.9">
                <text:p>46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0.3">
                <text:p>117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0.2">
                <text:p>81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5.75">
                <text:p>515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50.5">
                <text:p>145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0.4">
                <text:p>69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0.8">
                <text:p>42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30.6">
                <text:p>113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0.25">
                <text:p>48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0.3">
                <text:p>68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0.8">
                <text:p>118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0.5">
                <text:p>147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5.25">
                <text:p>48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00.1">
                <text:p>150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70.3">
                <text:p>67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0.5">
                <text:p>46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0.75">
                <text:p>83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0.4">
                <text:p>5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0.2">
                <text:p>137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0.6">
                <text:p>69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0.9">
                <text:p>44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0.3">
                <text:p>1160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5.75">
                <text:p>525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0.4">
                <text:p>72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0.8">
                <text:p>44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0.6">
                <text:p>115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0.9">
                <text:p>83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0.25">
                <text:p>49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0.3">
                <text:p>69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0.5">
                <text:p>48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0.8">
                <text:p>117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0.2">
                <text:p>79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0.75">
                <text:p>51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40.5">
                <text:p>144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0.4">
                <text:p>70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0.8">
                <text:p>41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0.9">
                <text:p>81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0.5">
                <text:p>43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0.2">
                <text:p>77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50.5">
                <text:p>145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0.5">
                <text:p>44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0.2">
                <text:p>80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50.5">
                <text:p>145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0.5">
                <text:p>44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50.5">
                <text:p>145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0.8">
                <text:p>43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60.6">
                <text:p>116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0.9">
                <text:p>82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5.25">
                <text:p>49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90.1">
                <text:p>149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0.5">
                <text:p>44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00.8">
                <text:p>120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5.75">
                <text:p>505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0.5">
                <text:p>146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0.4">
                <text:p>7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0.8">
                <text:p>45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40.6">
                <text:p>1140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00.9">
                <text:p>80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5.25">
                <text:p>475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80.1">
                <text:p>1480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0.3">
                <text:p>66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0.5">
                <text:p>47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90.8">
                <text:p>119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80.2">
                <text:p>780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5.75">
                <text:p>515.7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7cm" svg:y="0.273cm" chart:style-name="ch2">
          <text:p>Memerhsip type vs Average spend</text:p>
        </chart:title>
        <chart:legend chart:legend-position="end" svg:x="12.784cm" svg:y="4.201cm" style:legend-expansion="high" chart:style-name="ch3"/>
        <chart:plot-area chart:style-name="ch4" table:cell-range-address="Charts.I1:Charts.J4" chart:data-source-has-labels="both" svg:x="1.331cm" svg:y="1.275cm" svg:width="11.133cm" svg:height="6.564cm">
          <chart:coordinate-region svg:x="2.799cm" svg:y="1.474cm" svg:width="9.66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Membership type</text:p>
            </chart:title>
            <chart:categories table:cell-range-address="Charts.I2:Charts.I4"/>
          </chart:axis>
          <chart:axis chart:dimension="y" chart:name="primary-y" chart:style-name="ch7">
            <chart:title svg:x="0.451cm" svg:y="5.659cm" chart:style-name="ch8">
              <text:p>average spend</text:p>
            </chart:title>
            <chart:grid chart:style-name="ch9" chart:class="major"/>
          </chart:axis>
          <chart:series chart:style-name="ch10" chart:values-cell-range-address="Charts.J2:Charts.J4" chart:label-cell-address="Charts.J1:Charts.J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pend </text:p>
                <draw:g>
                  <svg:desc>Charts.J1:Char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old </text:p>
                <draw:g>
                  <svg:desc>Charts.I2:Charts.I4</svg:desc>
                </draw:g>
              </table:table-cell>
              <table:table-cell office:value-type="float" office:value="1311.14444444444">
                <text:p>1311.14444444444</text:p>
                <draw:g>
                  <svg:desc>Charts.J2:Charts.J4</svg:desc>
                </draw:g>
              </table:table-cell>
            </table:table-row>
            <table:table-row>
              <table:table-cell office:value-type="string">
                <text:p>silver</text:p>
              </table:table-cell>
              <table:table-cell office:value-type="float" office:value="748.432478632479">
                <text:p>748.432478632479</text:p>
              </table:table-cell>
            </table:table-row>
            <table:table-row>
              <table:table-cell office:value-type="string">
                <text:p>Bronze</text:p>
              </table:table-cell>
              <table:table-cell office:value-type="float" office:value="474.223684210526">
                <text:p>474.2236842105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Customer Satisfaction DIstribution</text:p>
        </chart:title>
        <chart:legend chart:legend-position="end" svg:x="14.345cm" svg:y="4.201cm" style:legend-expansion="high" chart:style-name="ch3"/>
        <chart:plot-area chart:style-name="ch4" table:cell-range-address="Charts.Q2:Charts.R4 Charts.R1:Charts.R1" chart:data-source-has-labels="both" svg:x="1.331cm" svg:y="1.275cm" svg:width="12.694cm" svg:height="6.564cm">
          <chart:coordinate-region svg:x="3.276cm" svg:y="1.275cm" svg:width="10.469cm" svg:height="5.917cm"/>
          <chart:axis chart:dimension="x" chart:name="primary-x" chart:style-name="ch5" chartooo:axis-type="auto">
            <chartooo:date-scale/>
            <chart:title svg:x="0.451cm" svg:y="5.038cm" chart:style-name="ch6">
              <text:p>count </text:p>
            </chart:title>
            <chart:categories table:cell-range-address="Charts.Q2:Charts.Q4"/>
          </chart:axis>
          <chart:axis chart:dimension="y" chart:name="primary-y" chart:style-name="ch7">
            <chart:title svg:x="6.801cm" svg:y="8.019cm" chart:style-name="ch8">
              <text:p>Satisfaction</text:p>
            </chart:title>
            <chart:grid chart:style-name="ch9" chart:class="major"/>
          </chart:axis>
          <chart:series chart:style-name="ch10" chart:values-cell-range-address="Charts.R2:Charts.R4" chart:label-cell-address="Charts.R1:Charts.R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harts.R1:Char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tisfied </text:p>
                <draw:g>
                  <svg:desc>Charts.Q2:Charts.Q4</svg:desc>
                </draw:g>
              </table:table-cell>
              <table:table-cell office:value-type="float" office:value="125">
                <text:p>125</text:p>
                <draw:g>
                  <svg:desc>Charts.R2:Charts.R4</svg:desc>
                </draw:g>
              </table:table-cell>
            </table:table-row>
            <table:table-row>
              <table:table-cell office:value-type="string">
                <text:p>Neutral 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Unsatisfied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